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Basic/TestLib/TestModule.xba" manifest:media-type="text/xml"/>
  <manifest:file-entry manifest:full-path="Basic/TestLib/script.xlb" manifest:media-type="text/xml"/>
  <manifest:file-entry manifest:full-path="Basic/script.xlc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column/>
        <table:table-row>
          <table:table-cell>
            <text:p>test</text:p>
          </table:table-cell>
        </table:table-row>
      </table:table>
    </office:spreadsheet>
  </office:body>
</office:document-content>
</file>