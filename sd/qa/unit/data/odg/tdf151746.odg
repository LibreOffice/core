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25000000360AAACB6AC.jpg" manifest:media-type="image/jpeg"/>
  <manifest:file-entry manifest:full-path="Pictures/1000000000000600000003C09F83F2D4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color="#00ff00" draw:fill-gradient-name="Present" draw:gradient-step-count="0"/>
    </style:style>
    <style:style style:name="gr1" style:family="graphic" style:parent-style-name="standard">
      <style:graphic-properties draw:textarea-horizontal-align="justify" draw:textarea-vertical-align="middle" draw:auto-grow-height="false" fo:min-height="4.25cm" fo:min-width="4cm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gradient" draw:fill-gradient-name="Pastel_20_Bouquet" draw:textarea-horizontal-align="justify" draw:textarea-vertical-align="middle" draw:auto-grow-height="false" fo:min-height="2.618cm" fo:min-width="2.368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fill="solid" draw:fill-color="#158466" draw:textarea-horizontal-align="justify" draw:textarea-vertical-align="middle" draw:auto-grow-height="false" fo:min-height="0.988cm" fo:min-width="2.15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3.08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Pastel_20_Bouquet"/>
      <style:paragraph-properties fo:text-align="center"/>
    </style:style>
    <style:style style:name="P3" style:family="paragraph">
      <loext:graphic-properties draw:fill="solid" draw:fill-color="#158466"/>
      <style:paragraph-properties fo:text-align="center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 draw:fill-color="#ffffff"/>
      <style:text-properties fo:color="#000000" loext:opacity="100%" fo:font-size="32pt" style:font-size-asian="32pt" style:font-size-complex="32pt"/>
    </style:style>
    <style:style style:name="T1" style:family="text">
      <style:text-properties fo:color="#000000" loext:opacity="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9cm" svg:x="3.5cm" svg:y="12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4.054cm" svg:height="4.054cm" svg:x="6.223cm" svg:y="15.22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custom-shape draw:style-name="gr3" draw:text-style-name="P3" draw:layer="layout" svg:width="3.75cm" svg:height="1.75cm" svg:x="4.7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7.25cm" svg:height="13.331cm" svg:x="11.75cm" svg:y="2.493cm">
          <draw:text-box>
            <text:p text:style-name="P4"><text:span text:style-name="T1">Sequi aliquid vitae vero repudiandae. Voluptas ad pariatur quod incidunt ipsum voluptas quae quia. </text:span></text:p>
            <text:p text:style-name="P4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1baa2" draw:end-color="#ccacac" draw:start-intensity="100%" draw:end-intensity="100%" draw:angle="30deg" draw:border="0%">
      <loext:gradient-stop svg:offset="0" loext:color-type="rgb" loext:color-value="#b1baa2"/>
      <loext:gradient-stop svg:offset="1" loext:color-type="rgb" loext:color-value="#ccacac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Present" draw:style="square" draw:cx="70%" draw:cy="60%" draw:start-color="#813709" draw:end-color="#ff4000" draw:start-intensity="100%" draw:end-intensity="100%" draw:angle="45deg" draw:border="72%">
      <loext:gradient-stop svg:offset="0" loext:color-type="rgb" loext:color-value="#813709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00000025000000360AAACB6AC.jpg" xlink:type="simple" xlink:show="embed" xlink:actuate="onLoad"/>
    <draw:fill-image draw:name="background" xlink:href="Pictures/1000000000000600000003C09F83F2D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none"/>
    </style:style>
    <style:style style:name="Mgr1" style:family="graphic" style:parent-style-name="standard">
      <style:graphic-properties draw:textarea-horizontal-align="justify" draw:textarea-vertical-align="middle" draw:auto-grow-height="false" fo:min-height="4.5cm" fo:min-width="5.75cm" loext:decorative="false"/>
    </style:style>
    <style:style style:name="Mgr2" style:family="graphic" style:parent-style-name="standard">
      <style:graphic-properties draw:textarea-horizontal-align="justify" draw:textarea-vertical-align="middle" draw:auto-grow-height="false" fo:min-height="2.226cm" fo:min-width="4.98cm" loext:decorative="fals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in-height="4.39cm" loext:decorative="false"/>
      <style:paragraph-properties style:writing-mode="lr-tb"/>
    </style:style>
    <style:style style:name="MP1" style:family="paragraph">
      <style:paragraph-properties fo:text-align="center"/>
    </style:style>
    <style:style style:name="MP2" style:family="paragraph">
      <style:paragraph-properties fo:margin-top="0.42cm" fo:margin-bottom="0.35cm"/>
    </style:style>
    <style:style style:name="MP3" style:family="paragraph">
      <loext:graphic-properties draw:fill="none" draw:fill-color="#ffffff"/>
    </style:style>
    <style:style style:name="MT1" style:family="text">
      <style:text-properties fo:color="#c9211e" loext:opacity="100%" fo:font-size="16pt" style:font-size-asian="16pt" style:font-size-complex="16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" draw:text-style-name="MP1" draw:layer="backgroundobjects" svg:width="6.25cm" svg:height="4.75cm" svg:x="3.25cm" svg:y="5.5cm">
        <text:p/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7.75cm" svg:height="3.5cm" svg:x="10.5cm" svg:y="2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3" draw:layer="backgroundobjects" svg:width="6.25cm" svg:height="4.64cm" svg:x="11.75cm" svg:y="6.25cm">
        <draw:text-box>
          <text:p text:style-name="MP2"><text:span text:style-name="MT1">Sequi aliquid vitae vero repudiandae. Voluptas ad pariatur quod incidunt ipsum voluptas quae quia. Sed quia expedita explicabo aut odit</text:span><text:span text:style-name="MT2">. </text:span></text:p>
        </draw:text-box>
      </draw:frame>
    </style:master-page>
    <style:master-page style:name="Default_20_2" style:display-name="Default 2" style:page-layout-name="PM0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Default_20_3" style:display-name="Default 3" style:page-layout-name="PM0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Default_20_1" style:display-name="Default 1" style:page-layout-name="PM0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EarnestAl</meta:initial-creator>
    <meta:creation-date>2022-10-25T18:12:05.312000000</meta:creation-date>
    <dc:date>2026-02-19T22:04:46.988673000</dc:date>
    <meta:editing-duration>PT3H1M42S</meta:editing-duration>
    <meta:editing-cycles>9</meta:editing-cycles>
    <meta:generator>LibreOffice/25.8.4.2$Windows_X86_64 LibreOffice_project/290daaa01b999472f0c7a3890eb6a550fd74c6df</meta:generator>
    <meta:document-statistic meta:object-count="7"/>
  </office:meta>
</office:document-meta>
</file>