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8.7cm" fo:min-width="25.45cm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los Vajna</meta:initial-creator>
    <meta:creation-date>2026-05-21T15:20:28.817202656</meta:creation-date>
    <dc:date>2026-05-21T15:20:52.445241190</dc:date>
    <dc:creator>Miklos Vajna</dc:creator>
    <meta:editing-duration>PT24S</meta:editing-duration>
    <meta:editing-cycles>1</meta:editing-cycles>
    <meta:document-statistic meta:object-count="24"/>
    <meta:generator>Collabora_Office/26.04.0.20260509$Linux_X86_64 LibreOffice_project/7c8a8f173fa69ac3db1bb2a34d780742dc7c7bf2</meta:generator>
  </office:meta>
</office:document-meta>
</file>