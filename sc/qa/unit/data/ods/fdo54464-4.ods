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=5" style:apply-style-name="Result2" style:base-cell-address="Tabelle1.A1"/>
    </style:style>
  </office:automatic-styles>
  <office:body>
    <office:spreadsheet>
      <table:table table:name="Tabelle1" table:style-name="ta1">
        <table:table-column table:style-name="co1" table:default-cell-style-name="ce1"/>
        <table:table-row table:style-name="ro1">
          <table:table-cell office:value-type="float" office:value="5">
            <text:p>5</text:p>
          </table:table-cell>
        </table:table-row>
        <calcext:conditional-formats>
          <calcext:conditional-format calcext:target-range-address="Tabelle1.A1:Tabelle1.A1">
            <calcext:condition calcext:apply-style-name="Ergebnis2" calcext:value="&gt;=5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00.00.0000</text:date>, <text:time style:data-style-name="N2" text:time-value="0000-00-00T18:06:5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9T17:56:12</meta:creation-date>
    <dc:date>2012-11-09T18:07:18</dc:date>
    <meta:editing-duration>PT14S</meta:editing-duration>
    <meta:editing-cycles>3</meta:editing-cycles>
    <meta:generator>LibreOffice/3.6$Linux_X86_64 LibreOffice_project/360m1$Build-2</meta:generator>
    <meta:document-statistic meta:table-count="1" meta:cell-count="1" meta:object-count="0"/>
  </office:meta>
</office:document-meta>
</file>