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Nabla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bla" svg:font-family="Nabla" style:font-pitch="variable">
      <svg:font-face-src>
        <svg:font-face-uri xlink:href="Fonts/Font_Nabla_1.ttf" xlink:type="simple" loext:font-style="normal" loext:font-weight="normal">
          <svg:font-face-format svg:string="truetype"/>
        </svg:font-face-uri>
      </svg:font-face-src>
    </style:font-face>
    <style:font-face style:name="Songti SC" svg:font-family="'Songti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Nabla" fo:font-size="96pt" officeooo:rsid="001bb434" officeooo:paragraph-rsid="001bb434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bla" svg:font-family="Nabla" style:font-pitch="variable"/>
    <style:font-face style:name="Songti SC" svg:font-family="'Songti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EG" style:letter-kerning="true" style:font-name-asian="Songti SC" style:font-size-asian="10.5pt" style:language-asian="zh" style:country-asian="CN" style:font-name-complex="Tahoma1" style:font-size-complex="12pt" style:language-complex="ar" style:country-complex="EG" loext:font-optical-sizing="auto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EG" style:letter-kerning="true" style:font-name-asian="Songti SC" style:font-size-asian="10.5pt" style:language-asian="zh" style:country-asian="CN" style:font-name-complex="Tahoma1" style:font-size-complex="12pt" style:language-complex="ar" style:country-complex="EG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19:37:53.753461000</meta:creation-date>
    <dc:date>2026-04-11T19:38:30.446702000</dc:date>
    <meta:editing-duration>PT38S</meta:editing-duration>
    <meta:editing-cycles>1</meta:editing-cycles>
    <meta:generator>LibreOfficeDev/26.8.0.0.alpha0$MacOSX_AARCH64 LibreOffice_project/bf3d9c35206aa6f0b6c970fbd5408e372d94ee7d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