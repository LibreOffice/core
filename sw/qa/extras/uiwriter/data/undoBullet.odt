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6f274" officeooo:paragraph-rsid="0006f274"/>
    </style:style>
    <style:style style:name="P2" style:family="paragraph" style:parent-style-name="Standard" style:list-style-name="L1">
      <style:text-properties officeooo:rsid="000849a0" officeooo:paragraph-rsid="000849a0"/>
    </style:style>
    <style:style style:name="P3" style:family="paragraph" style:parent-style-name="Standard" style:list-style-name="L2">
      <style:text-properties officeooo:rsid="0006f274" officeooo:paragraph-rsid="0006f274"/>
    </style:style>
    <style:style style:name="T1" style:family="text">
      <style:text-properties officeooo:rsid="000849a0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tracked-changes>
        <text:changed-region xml:id="ct2997502540512" text:id="ct2997502540512">
          <text:insertion>
            <office:change-info>
              <dc:creator>Unknown Author</dc:creator>
              <dc:date>2026-06-02T05:49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m</text:span>mm<text:change-start text:change-id="ct2997502540512"/></text:p>
        </text:list-item>
        <text:list-item>
          <text:p text:style-name="P2"><text:change-end text:change-id="ct2997502540512"/>nnn</text:p>
        </text:list-item>
      </text:list>
      <text:list text:style-name="L2">
        <text:list-item>
          <text:list>
            <text:list-item>
              <text:p text:style-name="P3">aaa</text:p>
            </text:list-item>
            <text:list-item>
              <text:p text:style-name="P3">bbb</text:p>
              <text:list>
                <text:list-item>
                  <text:p text:style-name="P3">ccc</text:p>
                </text:list-item>
                <text:list-item>
                  <text:p text:style-name="P3">ddd</text:p>
                </text:list-item>
                <text:list-item>
                  <text:p text:style-name="P3">eee</text:p>
                </text:list-item>
              </text:list>
            </text:list-item>
            <text:list-item>
              <text:p text:style-name="P3">ff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2T05:43:19.401005200</meta:creation-date>
    <dc:date>2026-06-02T05:50:35.010953500</dc:date>
    <meta:editing-duration>PT7M11S</meta:editing-duration>
    <meta:editing-cycles>2</meta:editing-cycles>
    <meta:generator>LibreOfficeDev/26.8.0.0.alpha0$Windows_X86_64 LibreOffice_project/f798d1ef8ed84c8b45ed9042452430e5d1aad05c</meta:generator>
    <meta:document-statistic meta:table-count="0" meta:image-count="0" meta:object-count="0" meta:page-count="1" meta:paragraph-count="8" meta:word-count="16" meta:character-count="50" meta:non-whitespace-character-count="50"/>
  </office:meta>
</office:document-meta>
</file>