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9dab6" officeooo:paragraph-rsid="0019dab6"/>
    </style:style>
  </office:automatic-styles>
  <office:body>
    <office:text>
      <text:tracked-changes text:track-changes="false">
        <text:changed-region xml:id="ct123622446672224" text:id="ct123622446672224">
          <text:deletion>
            <office:change-info>
              <dc:creator>Unknown Author</dc:creator>
              <dc:date>2026-06-17T09:55:35</dc:date>
            </office:change-info>
            <text:p text:style-name="P1">Expunged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123622446672224"/>Text</text:p>
      <text:p text:style-name="P1">Expunged 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dab6" officeooo:paragraph-rsid="0019dab6"/>
    </style:style>
    <style:style style:name="MP2" style:family="paragraph" style:parent-style-name="Footer" style:list-style-name="ML1">
      <style:text-properties officeooo:rsid="0019dab6" officeooo:paragraph-rsid="0019dab6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Intelligently handle Find/Replace in Track Changes</text:p>
      </style:header>
      <style:footer>
        <text:list text:style-name="ML1">
          <text:list-item>
            <text:p text:style-name="MP2">Never replace a mixture of deleted/non-deleted text</text:p>
          </text:list-item>
          <text:list-item>
            <text:p text:style-name="MP2">Never ‘insert’ when replacing a deletion</text:p>
            <text:list>
              <text:list-item>
                <text:p text:style-name="MP2">just change the underlying text</text:p>
              </text:list-item>
            </text:list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09:51:06.116352220</meta:creation-date>
    <dc:date>2026-06-17T09:55:45.909045798</dc:date>
    <meta:editing-duration>PT4M41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1" meta:paragraph-count="6" meta:word-count="30" meta:character-count="192" meta:non-whitespace-character-count="171"/>
  </office:meta>
</office:document-meta>
</file>