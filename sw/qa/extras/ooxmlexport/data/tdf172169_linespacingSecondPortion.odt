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CC91954A.png" manifest:media-type="image/png"/>
  <manifest:file-entry manifest:full-path="Pictures/10003AD3000069D5000069D5E26DD88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1" style:family="text">
      <style:text-properties officeooo:rsid="002477c2"/>
    </style:style>
    <style:style style:name="T2" style:family="text">
      <style:text-properties officeooo:rsid="00255900"/>
    </style:style>
    <style:style style:name="T3" style:family="text">
      <style:text-properties fo:font-size="60pt" officeooo:rsid="002477c2" fo:background-color="#ffff00" loext:char-shading-value="0" style:font-size-asian="60pt" style:font-size-complex="6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here was a 7.1 bug introduced, where if line height </text:span><text:span text:style-name="T2">was </text:span><text:span text:style-name="T1">already </text:span><text:span text:style-name="T2">big </text:span><text:span text:style-name="T1"><draw:frame draw:style-name="fr1" draw:name="Image1" text:anchor-type="as-char" svg:width="2.499cm" svg:height="2.499cm" draw:z-index="0"><draw:image xlink:href="Pictures/10003AD3000069D5000069D5E26DD88B.svg" xlink:type="simple" xlink:show="embed" xlink:actuate="onLoad" draw:mime-type="image/svg+xml"/><draw:image xlink:href="Pictures/10000001000002C3000002C3CC91954A.png" xlink:type="simple" xlink:show="embed" xlink:actuate="onLoad" draw:mime-type="image/png"/></draw:frame></text:span><text:span text:style-name="T1"><text:s/>then a following </text:span><text:span text:style-name="T3">size</text:span><text:span text:style-name="T1"> that should also affect the line spacing was not applied. </text:span><text:span text:style-name="T2">If this is working properly, then this document is two pages lo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6.8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09:16:40.092739998</meta:creation-date>
    <dc:date>2026-05-22T08:30:08.393898971</dc:date>
    <meta:editing-duration>PT2H17M27S</meta:editing-duration>
    <meta:editing-cycles>27</meta:editing-cycles>
    <meta:generator>LibreOffice/26.2.2.2$Linux_X86_64 LibreOffice_project/620$Build-2</meta:generator>
    <meta:document-statistic meta:table-count="0" meta:image-count="1" meta:object-count="0" meta:page-count="1" meta:paragraph-count="1" meta:word-count="39" meta:character-count="216" meta:non-whitespace-character-count="177"/>
  </office:meta>
</office:document-meta>
</file>