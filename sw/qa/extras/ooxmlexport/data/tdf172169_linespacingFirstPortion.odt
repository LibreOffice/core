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master-page-name="">
      <style:paragraph-properties style:page-number="auto"/>
      <style:text-properties officeooo:rsid="0018cd98" officeooo:paragraph-rsid="0018cd98"/>
    </style:style>
    <style:style style:name="P2" style:family="paragraph" style:parent-style-name="Footnote">
      <style:text-properties officeooo:rsid="001ecc08" officeooo:paragraph-rsid="001ecc08"/>
    </style:style>
    <style:style style:name="P3" style:family="paragraph" style:parent-style-name="Standard" style:list-style-name="L2">
      <style:paragraph-properties fo:break-before="page"/>
      <style:text-properties officeooo:paragraph-rsid="001a7897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officeooo:rsid="001f2dc3"/>
    </style:style>
    <style:style style:name="T3" style:family="text">
      <style:text-properties officeooo:rsid="001a789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need to create a line starting with non-Text with a large Font. <text:span text:style-name="T1"><text:note text:id="ftn1" text:note-class="footnote"><text:note-citation>1</text:note-citation><text:note-body><text:p text:style-name="P2">First portion is a <text:span text:style-name="T2">LO</text:span> anomaly <text:span text:style-name="T2">since</text:span> the 7.1 change</text:p></text:note-body></text:note></text:span><text:s/>Footnote is <text:span text:style-name="T2">a non-Text</text:span> <text:span text:style-name="T2">according to</text:span> <text:span text:style-name="T2">MS Word</text:span>.</text:p>
      <text:list text:style-name="L2">
        <text:list-item>
          <text:p text:style-name="P3"><text:span text:style-name="T3">How about numbering. In ODT it is irrelevant because it always starts on the first line, but for DOCX it should matter. In my testing I have only tested single-line numbering so far. Large numbering is ignored in terms of line-spacing. So this all fits on a single page..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orphans="0" fo:widows="0" style:page-number="auto"/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fo:font-size="60pt" style:font-name-asian="OpenSymbol" style:font-family-asian="OpenSymbol" style:font-charset-asian="x-symbol" style:font-size-asian="52.5pt" style:font-name-complex="OpenSymbol" style:font-family-complex="OpenSymbol" style:font-charset-complex="x-symbol" style:font-size-complex="60pt" loext:padding="0.051cm" loext:border="1.5pt solid #ffbf00"/>
    </style:style>
    <style:style style:name="Numbering_20_Symbols" style:display-name="Numbering Symbols" style:family="text">
      <style:text-properties fo:font-size="60pt" style:font-size-asian="52.5pt" style:font-size-complex="6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5T08:52:12.985232101</meta:creation-date>
    <dc:date>2026-06-02T07:07:03.876445281</dc:date>
    <meta:editing-duration>PT19M28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3" meta:word-count="82" meta:character-count="436" meta:non-whitespace-character-count="358"/>
  </office:meta>
</office:document-meta>
</file>