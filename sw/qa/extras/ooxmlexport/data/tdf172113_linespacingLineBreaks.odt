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list-style-name="L1">
      <style:paragraph-properties fo:line-height="200%" style:writing-mode="lr-tb"/>
      <style:text-properties officeooo:paragraph-rsid="0008d00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<text:line-break/><text:line-break/><text:line-break/><text:line-break/><text:line-break/><text:line-break/><text:line-break/><text:soft-page-break/>Line breaks need to also be double spaced. This is a two page document.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orphans="0" fo:widows="0" style:page-number="auto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Numbering_20_Symbols" style:display-name="Numbering Symbols" style:family="text">
      <style:text-properties fo:font-size="32pt" style:font-size-asian="28pt" style:font-size-complex="3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4.1339in" style:num-format="1" style:print-orientation="landscape" fo:margin-top="0.75in" fo:margin-bottom="0.7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0:32:21.527483361</meta:creation-date>
    <dc:date>2026-05-30T10:45:01.033480680</dc:date>
    <meta:editing-duration>PT3M16S</meta:editing-duration>
    <meta:editing-cycles>3</meta:editing-cycles>
    <meta:generator>LibreOfficeDev/26.8.0.0.alpha1$Linux_X86_64 LibreOffice_project/80e73855ef292ff5386a87f02c7d9a54d601ec27</meta:generator>
    <meta:document-statistic meta:table-count="0" meta:image-count="0" meta:object-count="0" meta:page-count="2" meta:paragraph-count="1" meta:word-count="14" meta:character-count="78" meta:non-whitespace-character-count="58"/>
  </office:meta>
</office:document-meta>
</file>