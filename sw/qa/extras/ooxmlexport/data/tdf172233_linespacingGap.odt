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erif" svg:font-family="'Liberation Serif'" style:font-adornments="Regular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 style:master-page-name="">
      <style:paragraph-properties style:page-number="auto" fo:break-before="auto" fo:break-after="auto"/>
      <style:text-properties officeooo:rsid="001b2440" officeooo:paragraph-rsid="001b2440"/>
    </style:style>
    <style:style style:name="T1" style:family="text">
      <style:text-properties officeooo:rsid="001b2440"/>
    </style:style>
    <style:style style:name="T2" style:family="text">
      <style:text-properties fo:font-size="60pt" officeooo:rsid="0019eee4" style:font-size-asian="60pt" style:font-size-complex="6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What about below spacing? That only affects between paragraphs. Is it collapsed by line spacing</text:span><text:span text:style-name="T2">?</text:span></text:p>
      <text:p text:style-name="P1">Good question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erif" svg:font-family="'Liberation Serif'" style:font-adornments="Regular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loext:font-optical-sizing="auto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loext:font-optical-sizing="auto" fo:hyphenate="false" fo:hyphenation-remain-char-count="2" fo:hyphenation-push-char-count="2" loext:hyphenation-no-caps="false" loext:hyphenation-no-last-word="false" loext:hyphenation-word-char-count="5" loext:hyphenation-zone="no-limit" loext:hyphenation-compound-remain-char-count="2" loext:hyphenation-compound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200%" fo:orphans="0" fo:widows="0" style:page-number="auto"/>
      <style:text-properties style:font-name="Liberation Serif" fo:font-family="'Liberation Serif'" style:font-style-name="Regular" style:font-family-generic="roman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Noto Sans" style:font-family-complex="'Noto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5.8299in" fo:page-height="4.1299in" style:num-format="1" style:print-orientation="landscape" fo:margin-top="0.7902in" fo:margin-bottom="0.7902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5T08:52:12.985232101</meta:creation-date>
    <dc:date>2026-05-25T13:30:12.001567109</dc:date>
    <meta:editing-duration>PT4M24S</meta:editing-duration>
    <meta:editing-cycles>6</meta:editing-cycles>
    <meta:generator>LibreOfficeDev/26.8.0.0.alpha0$Linux_X86_64 LibreOffice_project/193387bf52641875e1ba8edd4e8c358367cf2c9c</meta:generator>
    <meta:document-statistic meta:table-count="0" meta:image-count="0" meta:object-count="0" meta:page-count="1" meta:paragraph-count="2" meta:word-count="17" meta:character-count="110" meta:non-whitespace-character-count="95"/>
  </office:meta>
</office:document-meta>
</file>