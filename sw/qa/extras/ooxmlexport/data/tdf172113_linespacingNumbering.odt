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 style:list-style-name="L1">
      <style:text-properties officeooo:rsid="00096912" officeooo:paragraph-rsid="00077b28"/>
    </style:style>
    <style:style style:name="T1" style:family="text">
      <style:text-properties officeooo:rsid="000a9d0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Line spacing changed in LO 27.2</text:p>
        </text:list-item>
        <text:list-item>
          <text:p text:style-name="P1">Numbering no longer affects line spacing’<text:span text:style-name="T1">s gap</text:span></text:p>
        </text:list-item>
        <text:list-item>
          <text:p text:style-name="P1">(It used to <text:span text:style-name="T1">for single-line paragraphs</text:span>)</text:p>
        </text:list-item>
        <text:list-item>
          <text:p text:style-name="P1">Now all <text:span text:style-name="T1">4</text:span> points fit on one page – <text:span text:style-name="T1">like DOCX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loext:font-optical-sizing="auto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loext:font-optical-sizing="auto" fo:hyphenate="false" fo:hyphenation-remain-char-count="2" fo:hyphenation-push-char-count="2" loext:hyphenation-no-caps="false" loext:hyphenation-no-last-word="false" loext:hyphenation-word-char-count="5" loext:hyphenation-zone="no-limit" loext:hyphenation-compound-remain-char-count="2" loext:hyphenation-compound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200%" style:page-number="auto"/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Numbering_20_Symbols" style:display-name="Numbering Symbols" style:family="text">
      <style:text-properties fo:font-size="32pt" style:font-size-asian="28pt" style:font-size-complex="3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.8272in" fo:page-height="4.1339in" style:num-format="1" style:print-orientation="landscape" fo:margin-top="0.75in" fo:margin-bottom="0.75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30T10:32:21.527483361</meta:creation-date>
    <dc:date>2026-05-30T10:33:50.715754707</dc:date>
    <meta:editing-duration>PT1M33S</meta:editing-duration>
    <meta:editing-cycles>1</meta:editing-cycles>
    <meta:document-statistic meta:table-count="0" meta:image-count="0" meta:object-count="0" meta:page-count="1" meta:paragraph-count="4" meta:word-count="33" meta:character-count="168" meta:non-whitespace-character-count="142"/>
    <meta:generator>LibreOfficeDev/26.8.0.0.alpha1$Linux_X86_64 LibreOffice_project/80e73855ef292ff5386a87f02c7d9a54d601ec27</meta:generator>
  </office:meta>
</office:document-meta>
</file>