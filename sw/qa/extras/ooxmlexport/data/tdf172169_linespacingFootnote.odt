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CC91954A.png" manifest:media-type="image/png"/>
  <manifest:file-entry manifest:full-path="Pictures/10003AD3000069D5000069D5E26DD88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200%" style:writing-mode="lr-tb"/>
      <style:text-properties officeooo:paragraph-rsid="00397a48"/>
    </style:style>
    <style:style style:name="P2" style:family="paragraph" style:parent-style-name="Footnote">
      <style:text-properties officeooo:rsid="00118912" officeooo:paragraph-rsid="00118912"/>
    </style:style>
    <style:style style:name="T1" style:family="text">
      <style:text-properties officeooo:rsid="003a96d5"/>
    </style:style>
    <style:style style:name="T2" style:family="text">
      <style:text-properties officeooo:rsid="003c3bed"/>
    </style:style>
    <style:style style:name="T3" style:family="text">
      <style:text-properties officeooo:rsid="003f65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 absurd edge case. If the first portion in the line is a non-text </text:span><text:span text:style-name="T1"><draw:frame draw:style-name="fr1" draw:name="Image1" text:anchor-type="as-char" svg:width="2.63cm" svg:height="2.63cm" draw:z-index="0"><draw:image xlink:href="Pictures/10003AD3000069D5000069D5E26DD88B.svg" xlink:type="simple" xlink:show="embed" xlink:actuate="onLoad" draw:mime-type="image/svg+xml"/><draw:image xlink:href="Pictures/10000001000002C3000002C3CC91954A.png" xlink:type="simple" xlink:show="embed" xlink:actuate="onLoad" draw:mime-type="image/png"/></draw:frame></text:span>then a footnote<text:note text:id="ftn1" text:note-class="footnote"><text:note-citation>1</text:note-citation><text:note-body><text:p text:style-name="P2"><text:span text:style-name="T2">Even prior to</text:span> LO 7.1</text:p></text:note-body></text:note> <text:span text:style-name="T1">triggered some huge spacing </text:span><text:soft-page-break/><text:span text:style-name="T1">anomaly. </text:span><text:span text:style-name="T3">Pretty weird, eh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line-height="100%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6.8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8T09:16:40.092739998</meta:creation-date>
    <dc:date>2026-05-28T10:57:57.310242306</dc:date>
    <meta:editing-duration>PT3H32M11S</meta:editing-duration>
    <meta:editing-cycles>48</meta:editing-cycles>
    <meta:generator>LibreOffice/26.2.2.2$Linux_X86_64 LibreOffice_project/620$Build-2</meta:generator>
    <meta:document-statistic meta:table-count="0" meta:image-count="1" meta:object-count="0" meta:page-count="2" meta:paragraph-count="2" meta:word-count="30" meta:character-count="159" meta:non-whitespace-character-count="131"/>
  </office:meta>
</office:document-meta>
</file>