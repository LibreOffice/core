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2" style:family="table-cell" style:parent-style-name="Pivot_20_Table_20_Field" style:data-style-name="N100"/>
    <style:style style:name="ce13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Default">
      <style:table-cell-properties fo:border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porting this to Archival PDF will trigger PDF warning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caolan/LibreOffice/collabora-online/cypress_test/data/desktop/writer/help_dialog.odt/content.xml"/>
              </form:propertie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>
            <draw:control draw:z-index="0" draw:name="Control 1" draw:style-name="gr1" draw:text-style-name="P1" svg:width="11.116cm" svg:height="1.061cm" svg:x="0.165cm" svg:y="0.425cm" draw:control="control1"/>
          </table:table-cell>
          <table:table-cell/>
        </table:table-row>
      </table:table>
      <table:table table:name="hidden" table:style-name="ta2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ivotTable" table:style-name="ta1">
        <office:forms form:automatic-focus="false" form:apply-design-mode="false"/>
        <table:table-column table:style-name="co3" table:default-cell-style-name="ce15"/>
        <table:table-column table:style-name="co3" table:default-cell-style-name="ce20"/>
        <table:table-row table:style-name="ro1">
          <table:table-cell table:style-name="ce12" office:value-type="string" calcext:value-type="string">
            <text:p>12</text:p>
          </table:table-cell>
          <table:table-cell table:style-name="ce17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8" office:value-type="string" calcext:value-type="string">
            <text:p>Sum - 1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float" office:value="88" calcext:value-type="float">
            <text:p>88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2" office:value-type="float" office:value="293" calcext:value-type="float">
            <text:p>293</text:p>
          </table:table-cell>
        </table:table-row>
      </table:table>
      <table:table table:name="Sparkline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calcext:sparkline-groups>
          <calcext:sparkline-group calcext:id="{4FD28D6F-A7FF-4113-8A07-F9EA5FB5112F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parkline.B1" calcext:data-range="Sparkline.A1:Sparkline.A10"/>
            </calcext:sparklines>
          </calcext:sparkline-group>
        </calcext:sparkline-groups>
      </table:table>
      <table:named-expressions/>
      <table:data-pilot-tables>
        <table:data-pilot-table table:name="DataPilot1" table:application-data="" table:target-range-address="PivotTable.A1:PivotTable.B13" table:buttons="PivotTable.A1 PivotTable.A3" table:show-filter-button="false" table:drill-down-on-double-click="false">
          <table:source-cell-range table:cell-range-address="Sheet2.A1:Sheet2.B10"/>
          <table:data-pilot-field table:source-field-name="12" table:orientation="page" table:used-hierarchy="0" table:function="auto" loext:ignore-selected-page="true" table:selected-page="4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54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2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20:19:21.803997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5-25T20:21:06.304800946</dc:date>
    <meta:editing-duration>PT16M5S</meta:editing-duration>
    <meta:editing-cycles>15</meta:editing-cycles>
    <meta:document-statistic meta:table-count="5" meta:cell-count="68" meta:object-count="1"/>
    <meta:user-defined meta:name="Duration" meta:value-type="time">P0D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100690024000800a40049004f00bb009800660036000f0020009a009300ab">
    <SignedInfo>
      <CanonicalizationMethod Algorithm="http://www.w3.org/TR/2001/REC-xml-c14n-20010315"/>
      <SignatureMethod Algorithm="http://www.w3.org/2001/04/xmldsig-more#rsa-sha256"/>
      <Reference URI="Thumbnails/thumbnail.png">
        <DigestMethod Algorithm="http://www.w3.org/2001/04/xmlenc#sha256"/>
        <DigestValue>tXdpmQzuMY9HjWQwELjeJgugX1ngvp0NlSUdUZmGy9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umeNtvYSjhoYsms0AoLcCududAGye1v+2S66CBS4RUc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RDiwXvCRVNPxMPGDv8SwMvxupjpOII/MIhKAOIHuLTo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TGS/mbSpUJKAZsJzo8SZSl9ifewgvwWH7vM/H4Ropyk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KZtsVvQIcDSIkEMuuQvc/NNVAzR4HJ2A4Lx2Mv3CcFc=</DigestValue>
      </Reference>
      <Reference URI="manifest.rdf">
        <DigestMethod Algorithm="http://www.w3.org/2001/04/xmlenc#sha256"/>
        <DigestValue>rrKXmEsmowvZom8wSzm8fZGiZFdJs1578/RMS5UR3H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PSJyz82zKoG8+gVTbD0hQ42bY4sZvFeiWDGaBMVfOyk=</DigestValue>
      </Reference>
      <Reference URI="mimetype">
        <DigestMethod Algorithm="http://www.w3.org/2001/04/xmlenc#sha256"/>
        <DigestValue>JSqLlNenIxk1oeZLlBBAIh6+ELZAuhgvZ4D7uJvh2LE=</DigestValue>
      </Reference>
      <Reference URI="#ID_00d9007600ff005a007800dd004e00f000a4003c00d600630094000900b1007a">
        <DigestMethod Algorithm="http://www.w3.org/2001/04/xmlenc#sha256"/>
        <DigestValue>6z3tTwuvoQYiUyegzB9FETnsUv4odZEFkLPuGkbQ7Is=</DigestValue>
      </Reference>
      <Reference URI="#idSignedProperties_ID_002100690024000800a40049004f00bb009800660036000f0020009a009300ab" Type="http://uri.etsi.org/01903#SignedProperties">
        <DigestMethod Algorithm="http://www.w3.org/2001/04/xmlenc#sha256"/>
        <DigestValue>f3b2GtRWqL1QrrxF7I4EEPgRYFf0yad4zFDom12QzM4=</DigestValue>
      </Reference>
    </SignedInfo>
    <SignatureValue>T4nlIWW0+lhSsYvVQAl5QFPP9iyxVvrHucB97knCObzrnGLaRiyUUyExoroHGgzo
ASZpoTEIcy989pRNNV7YPXxZicSJuWFn8KUiTzX2X18Q8U/8gH31w2+Betr4zO0V
2uP5blRRc8n8j0vqkKJcf0xOfVPuNX0Oeu2vI/1rpCgvCys06rBl2M6V9p5T2rOg
NEmarxVLynbTr0utXxugQFxmtOZDGJYEwKd97UykvpGOhCe9cklNK5wFIgYaAjl/
vKkixHc8kHx2cS/A+IIFYxz7QgeC2UeNc2OBbyccpibiGP80IakhEdRBvTYvyBa4
wCj9fwdNCTBUxj7MTdF4RA==</SignatureValue>
    <KeyInfo>
      <X509Data>
        <X509IssuerSerial>
          <X509IssuerName>O=Default Company Ltd,L=Default City,C=IE</X509IssuerName>
          <X509SerialNumber>137647789108739231137854071153275811892259445730</X509SerialNumber>
        </X509IssuerSerial>
        <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509Certificate>
      </X509Data>
    </KeyInfo>
    <Object>
      <SignatureProperties>
        <SignatureProperty Id="ID_00d9007600ff005a007800dd004e00f000a4003c00d600630094000900b1007a" Target="#ID_002100690024000800a40049004f00bb009800660036000f0020009a009300ab">
          <dc:date xmlns:dc="http://purl.org/dc/elements/1.1/">2026-05-25T20:21:18.845991718</dc:date>
        </SignatureProperty>
      </SignatureProperties>
    </Object>
    <Object xmlns:xd="http://uri.etsi.org/01903/v1.3.2#">
      <xd:QualifyingProperties Target="#ID_002100690024000800a40049004f00bb009800660036000f0020009a009300ab">
        <xd:SignedProperties Id="idSignedProperties_ID_002100690024000800a40049004f00bb009800660036000f0020009a009300ab">
          <xd:SignedSignatureProperties>
            <xd:SigningTime>2026-05-25T20:21:18.845991718</xd:SigningTime>
            <xd:SigningCertificate>
              <xd:Cert>
                <xd:CertDigest>
                  <DigestMethod Algorithm="http://www.w3.org/2001/04/xmlenc#sha256"/>
                  <DigestValue>BeomAV8wt8xZKzo6ck1dwlz0wP+d0xRh+XhFkyC8rJ0=</DigestValue>
                </xd:CertDigest>
                <xd:IssuerSerial>
                  <X509IssuerName>O=Default Company Ltd,L=Default City,C=IE</X509IssuerName>
                  <X509SerialNumber>137647789108739231137854071153275811892259445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2100690024000800a40049004f00bb009800660036000f0020009a009300ab">
          <xd:UnsignedSignatureProperties>
            <xd:CertificateValues>
              <xd:Encapsulated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d:EncapsulatedX509Certificate>
            </xd:CertificateValues>
          </xd:UnsignedSignatureProperties>
        </xd:UnsignedProperties>
      </xd:QualifyingProperties>
    </Object>
  </Signature>
</document-signatures>
</file>