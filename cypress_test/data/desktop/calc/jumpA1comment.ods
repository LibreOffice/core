
<file path=META-INF/manifest.xml><?xml version="1.0" encoding="utf-8"?>
<manifest:manifest xmlns:manifest="urn:oasis:names:tc:opendocument:xmlns:manifest:1.0" xmlns:loext="urn:org:documentfoundation:names:experimental:office:xmlns:loext:1.0" xmlns:coext="urn:com:collaboraoffice:names:experimental:office:xmlns:c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css3t="http://www.w3.org/TR/css3-text/" xmlns:svg="urn:oasis:names:tc:opendocument:xmlns:svg-compatible:1.0" xmlns:presentation="urn:oasis:names:tc:opendocument:xmlns:presentation:1.0" xmlns:field="urn:openoffice:names:experimental:ooo-ms-interop:xmlns:field:1.0" xmlns:formx="urn:openoffice:names:experimental:ooxml-odf-interop:xmlns:form:1.0" xmlns:chart="urn:oasis:names:tc:opendocument:xmlns:chart:1.0" xmlns:table="urn:oasis:names:tc:opendocument:xmlns:table:1.0" xmlns:coext="urn:com:collaboraoffice:names:experimental:office:xmlns:coext:1.0" xmlns:number="urn:oasis:names:tc:opendocument:xmlns:datastyle:1.0" xmlns:meta="urn:oasis:names:tc:opendocument:xmlns:meta:1.0" xmlns:loext="urn:org:documentfoundation:names:experimental:office:xmlns:loext:1.0" office:version="1.4">
  <office:scripts/>
  <office:font-face-decls>
    <style:font-face style:name="Carlito" svg:font-family="Carlito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625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165in"/>
    </style:style>
    <style:style style:name="ro1" style:family="table-row">
      <style:table-row-properties style:row-height="0.6043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735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7d7" style:text-align-source="fix" style:repeat-content="false" style:vertical-align="middle"/>
      <style:paragraph-properties fo:text-align="center" fo:margin-left="0in"/>
      <style:text-properties fo:font-size="14pt" fo:font-weight="bold" style:font-weight-asian="bold" style:font-weight-complex="bold"/>
    </style:style>
    <style:style style:name="ce2" style:family="table-cell" style:parent-style-name="Default">
      <style:table-cell-properties fo:background-color="#dde8cb" style:text-align-source="fix" style:repeat-content="false" fo:wrap-option="wrap" style:vertical-align="middle"/>
      <style:paragraph-properties fo:text-align="center" fo:margin-left="0in"/>
      <style:text-properties fo:font-size="14pt" fo:font-weight="bold" style:font-weight-asian="bold" style:font-weight-complex="bold"/>
    </style:style>
    <style:style style:name="gr1" style:family="graphic" style:parent-style-name="Note">
      <style:graphic-properties fo:max-width="4.7244in" fo:min-height="0.1701in" fo:min-width="1.1417in" loext:decorative="false"/>
      <style:paragraph-properties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80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office:annotation draw:style-name="gr1" svg:width="1.1413in" svg:height="0.2488in" svg:x="1.8614in" svg:y="0in" draw:caption-point-x="-0.2402in" draw:caption-point-y="0.0039in">
              <dc:creator>admin</dc:creator>
              <dc:date>2026-06-26T12:28:18.67043</dc:date>
              <text:p>this is note for A1</text:p>
            </office:annotation>
            <text:p>HOVER TO JUMP</text:p>
          </table:table-cell>
          <table:table-cell table:number-columns-repeated="81"/>
        </table:table-row>
        <table:table-row table:style-name="ro2" table:number-rows-repeated="545">
          <table:table-cell table:number-columns-repeated="82"/>
        </table:table-row>
        <table:table-row table:style-name="ro3">
          <table:table-cell table:style-name="ce1" office:value-type="string" calcext:value-type="string">
            <office:annotation draw:style-name="gr1" svg:width="1.1413in" svg:height="0.2488in" svg:x="1.8614in" svg:y="96.75in" draw:caption-point-x="-0.2402in" draw:caption-point-y="0.0039in">
              <dc:creator>admin</dc:creator>
              <dc:date>2026-06-26T12:28:18.670430</dc:date>
              <text:p>this is note for A547</text:p>
            </office:annotation>
            <text:p>LEFT PANE</text:p>
          </table:table-cell>
          <table:table-cell table:number-columns-repeated="80"/>
          <table:table-cell table:style-name="ce2" office:value-type="string" calcext:value-type="string">
            <text:p>THIS IS STARTING POSI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css3t="http://www.w3.org/TR/css3-text/" xmlns:svg="urn:oasis:names:tc:opendocument:xmlns:svg-compatible:1.0" xmlns:presentation="urn:oasis:names:tc:opendocument:xmlns:presentation:1.0" xmlns:field="urn:openoffice:names:experimental:ooo-ms-interop:xmlns:field:1.0" xmlns:chart="urn:oasis:names:tc:opendocument:xmlns:chart:1.0" xmlns:table="urn:oasis:names:tc:opendocument:xmlns:table:1.0" xmlns:coext="urn:com:collaboraoffice:names:experimental:office:xmlns:coext:1.0" xmlns:number="urn:oasis:names:tc:opendocument:xmlns:datastyle:1.0" xmlns:meta="urn:oasis:names:tc:opendocument:xmlns:meta:1.0" xmlns:loext="urn:org:documentfoundation:names:experimental:office:xmlns:loext:1.0" office:version="1.4">
  <office:font-face-decls>
    <style:font-face style:name="Carlito" svg:font-family="Carlito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table-cell-properties fo:wrap-option="no-wrap"/>
      <style:paragraph-properties style:tab-stop-distance="0.5in"/>
      <style:text-properties style:font-name="Carlito" fo:font-size="10pt" fo:language="en" fo:country="US" style:font-name-asian="Noto Sans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Carlito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rlito" fo:font-family="Carlito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Classic">
        <loext:color loext:name="dark1" loext:color="#000000"/>
        <loext:color loext:name="light1" loext:color="#ffffff"/>
        <loext:color loext:name="dark2" loext:color="#2e2706"/>
        <loext:color loext:name="light2" loext:color="#eeeeee"/>
        <loext:color loext:name="accent1" loext:color="#3465a4"/>
        <loext:color loext:name="accent2" loext:color="#168253"/>
        <loext:color loext:name="accent3" loext:color="#d62e4e"/>
        <loext:color loext:name="accent4" loext:color="#729fcf"/>
        <loext:color loext:name="accent5" loext:color="#5eb91e"/>
        <loext:color loext:name="accent6" loext:color="#ea7500"/>
        <loext:color loext:name="hyperlink" loext:color="#0060ff"/>
        <loext:color loext:name="followed-hyperlink" loext:color="#8020d9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6">00/00/0000</text:date>, <text:time style:data-style-name="N2" text:time-value="12:27:07.53630847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26T12:26:50.534562533</meta:creation-date>
    <dc:date>2026-06-26T12:28:56.513260114</dc:date>
    <meta:editing-duration>PT1M49S</meta:editing-duration>
    <meta:editing-cycles>2</meta:editing-cycles>
    <meta:generator>Collabora_Office/26.04.2.0$Linux_X86_64 LibreOffice_project/ee587d47399955eb2327a0675b4e003ba1926075</meta:generator>
    <meta:document-statistic meta:table-count="1" meta:cell-count="2" meta:object-count="0"/>
  </office:meta>
</office:document-meta>
</file>