
<file path=META-INF/manifest.xml><?xml version="1.0" encoding="utf-8"?>
<manifest:manifest xmlns:manifest="urn:oasis:names:tc:opendocument:xmlns:manifest:1.0" xmlns:loext="urn:org:documentfoundation:names:experimental:office:xmlns:loext:1.0" xmlns:coext="urn:com:collaboraoffice:names:experimental:office:xmlns:c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field="urn:openoffice:names:experimental:ooo-ms-interop:xmlns:field:1.0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loext="urn:org:documentfoundation:names:experimental:office:xmlns:loext:1.0" xmlns:coext="urn:com:collaboraoffice:names:experimental:office:xmlns:coext:1.0" xmlns:math="http://www.w3.org/1998/Math/MathML" xmlns:form="urn:oasis:names:tc:opendocument:xmlns:form:1.0" xmlns:script="urn:oasis:names:tc:opendocument:xmlns:script:1.0" xmlns:dom="http://www.w3.org/2001/xml-events" xmlns:formx="urn:openoffice:names:experimental:ooxml-odf-interop:xmlns:form:1.0" xmlns:xsd="http://www.w3.org/2001/XMLSchema" xmlns:xsi="http://www.w3.org/2001/XMLSchema-instance" xmlns:xhtml="http://www.w3.org/1999/xhtml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number-columns-repeated="11" table:default-cell-style-name="Default"/>
        <table:table-row table:style-name="ro1" table:number-rows-repeated="3"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singleheader" table:target-range-address="Sheet1.C4:Sheet1.C4" table:on-update-keep-styles="true" table:on-update-keep-size="false"/>
        <table:database-range table:name="singlenoheader" table:target-range-address="Sheet1.A4:Sheet1.A4" table:on-update-keep-styles="true" table:on-update-keep-size="false" table:contains-header="false"/>
        <table:database-range table:name="twowheader" table:target-range-address="Sheet1.E4:Sheet1.E5" table:on-update-keep-styles="true" table:on-update-keep-size="false"/>
        <table:database-range table:name="twowheadertotals" table:target-range-address="Sheet1.G4:Sheet1.G5" table:on-update-keep-styles="true" table:on-update-keep-size="false" calcext:contains-footer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field="urn:openoffice:names:experimental:ooo-ms-interop:xmlns:field:1.0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coext="urn:com:collaboraoffice:names:experimental:office:xmlns:coext:1.0" xmlns:math="http://www.w3.org/1998/Math/MathML" xmlns:form="urn:oasis:names:tc:opendocument:xmlns:form:1.0" xmlns:script="urn:oasis:names:tc:opendocument:xmlns:script:1.0" xmlns:css3t="http://www.w3.org/TR/css3-text/" xmlns:dom="http://www.w3.org/2001/xml-events" xmlns:presentation="urn:oasis:names:tc:opendocument:xmlns:presentation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u" fo:country="HU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Classic">
        <loext:color loext:name="dark1" loext:color="#000000"/>
        <loext:color loext:name="light1" loext:color="#ffffff"/>
        <loext:color loext:name="dark2" loext:color="#2e2706"/>
        <loext:color loext:name="light2" loext:color="#eeeeee"/>
        <loext:color loext:name="accent1" loext:color="#3465a4"/>
        <loext:color loext:name="accent2" loext:color="#168253"/>
        <loext:color loext:name="accent3" loext:color="#d62e4e"/>
        <loext:color loext:name="accent4" loext:color="#729fcf"/>
        <loext:color loext:name="accent5" loext:color="#5eb91e"/>
        <loext:color loext:name="accent6" loext:color="#ea7500"/>
        <loext:color loext:name="hyperlink" loext:color="#0060ff"/>
        <loext:color loext:name="followed-hyperlink" loext:color="#8020d9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3">0000.00.00</text:date>, <text:time style:data-style-name="N2" text:time-value="12:40:21.506709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13T01:09:42.557365700</meta:creation-date>
    <dc:date>2026-05-13T12:42:18.205954600</dc:date>
    <meta:editing-duration>PT11M1S</meta:editing-duration>
    <meta:editing-cycles>3</meta:editing-cycles>
    <meta:generator>Collabora_Office/26.04.0.1$Windows_X86_64 LibreOffice_project/5afa4797d755cbf6173ca27282bb2c3ec800eb44</meta:generator>
    <meta:document-statistic meta:table-count="1" meta:cell-count="11" meta:object-count="0"/>
  </office:meta>
</office:document-meta>
</file>