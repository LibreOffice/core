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Gamma/Cherry.xml" manifest:media-type="text/xml"/>
  <manifest:file-entry manifest:full-path="Basic/Gamma/Apple.xml" manifest:media-type="text/xml"/>
  <manifest:file-entry manifest:full-path="Basic/Gamma/Banana.xml" manifest:media-type="text/xml"/>
  <manifest:file-entry manifest:full-path="Basic/Gamma/Damson.xml" manifest:media-type="text/xml"/>
  <manifest:file-entry manifest:full-path="Basic/Gamma/script-lb.xml" manifest:media-type="text/xml"/>
  <manifest:file-entry manifest:full-path="Basic/Delta/script-lb.xml" manifest:media-type="text/xml"/>
  <manifest:file-entry manifest:full-path="Basic/Alpha/script-lb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0" meta:object-count="0"/>
    <meta:generator>LibreOffice/24.8.0.3$Windows_X86_64 LibreOffice_project/0bdf1299c94fe897b119f97f3c613e9dca6be583</meta:generator>
  </office:meta>
</office:document-meta>
</file>

<file path=Basic/Alpha/script-lb.xml><?xml version="1.0" encoding="utf-8"?>
<!DOCTYPE library  PUBLIC '-//OpenOffice.org//DTD OfficeDocument 1.0//EN'  'library.dtd'>
<library:library xmlns:library="http://openoffice.org/2000/library" library:name="Alpha" library:readonly="false" library:passwordprotected="false"/>
</file>

<file path=Basic/Delta/script-lb.xml><?xml version="1.0" encoding="utf-8"?>
<!DOCTYPE library  PUBLIC '-//OpenOffice.org//DTD OfficeDocument 1.0//EN'  'library.dtd'>
<library:library xmlns:library="http://openoffice.org/2000/library" library:name="Delta" library:readonly="false" library:passwordprotected="false"/>
</file>

<file path=Basic/Gamma/Apple.xml><?xml version="1.0" encoding="utf-8"?>
<!DOCTYPE module  PUBLIC '-//OpenOffice.org//DTD OfficeDocument 1.0//EN'  'module.dtd'>
<script:module xmlns:script="http://openoffice.org/2000/script" script:name="Apple" script:language="StarBasic">Sub Apple
End Sub
</script:module>
</file>

<file path=Basic/Gamma/Banana.xml><?xml version="1.0" encoding="utf-8"?>
<!DOCTYPE module  PUBLIC '-//OpenOffice.org//DTD OfficeDocument 1.0//EN'  'module.dtd'>
<script:module xmlns:script="http://openoffice.org/2000/script" script:name="Banana" script:language="StarBasic">Sub Banana
End Sub
</script:module>
</file>

<file path=Basic/Gamma/Cherry.xml><?xml version="1.0" encoding="utf-8"?>
<!DOCTYPE module  PUBLIC '-//OpenOffice.org//DTD OfficeDocument 1.0//EN'  'module.dtd'>
<script:module xmlns:script="http://openoffice.org/2000/script" script:name="Cherry" script:language="StarBasic">Sub Cherry
End Sub
</script:module>
</file>

<file path=Basic/Gamma/Damson.xml><?xml version="1.0" encoding="utf-8"?>
<!DOCTYPE module  PUBLIC '-//OpenOffice.org//DTD OfficeDocument 1.0//EN'  'module.dtd'>
<script:module xmlns:script="http://openoffice.org/2000/script" script:name="Damson" script:language="StarBasic">Sub Damson
End Sub
</script:module>
</file>

<file path=Basic/Gamma/script-lb.xml><?xml version="1.0" encoding="utf-8"?>
<!DOCTYPE library  PUBLIC '-//OpenOffice.org//DTD OfficeDocument 1.0//EN'  'library.dtd'>
<library:library xmlns:library="http://openoffice.org/2000/library" library:name="Gamma" library:readonly="false" library:passwordprotected="false">
  <library:element library:name="Cherry"/>
  <library:element library:name="Apple"/>
  <library:element library:name="Banana"/>
  <library:element library:name="Damson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Gamma" library:link="false"/>
  <library:library library:name="Delta" library:link="false"/>
  <library:library library:name="Alpha" library:link="false"/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01008500f300f900260049004e00c1008e00280013002400c200b100d70007">
    <SignedInfo>
      <CanonicalizationMethod Algorithm="http://www.w3.org/TR/2001/REC-xml-c14n-20010315"/>
      <SignatureMethod Algorithm="http://www.w3.org/2001/04/xmldsig-more#rsa-sha256"/>
      <Reference URI="Basic/Alpha/script-lb.xml">
        <Transforms>
          <Transform Algorithm="http://www.w3.org/TR/2001/REC-xml-c14n-20010315"/>
        </Transforms>
        <DigestMethod Algorithm="http://www.w3.org/2001/04/xmlenc#sha256"/>
        <DigestValue>WsMVy0zxPM3+rlljyO0d32GMUU3VKaL+qrPejkx8PAc=</DigestValue>
      </Reference>
      <Reference URI="Basic/Delta/script-lb.xml">
        <Transforms>
          <Transform Algorithm="http://www.w3.org/TR/2001/REC-xml-c14n-20010315"/>
        </Transforms>
        <DigestMethod Algorithm="http://www.w3.org/2001/04/xmlenc#sha256"/>
        <DigestValue>gWI1VDnEvJGSDldqCaWNxNcTn7otHHvhmnviT/45SPg=</DigestValue>
      </Reference>
      <Reference URI="Basic/Gamma/script-lb.xml">
        <Transforms>
          <Transform Algorithm="http://www.w3.org/TR/2001/REC-xml-c14n-20010315"/>
        </Transforms>
        <DigestMethod Algorithm="http://www.w3.org/2001/04/xmlenc#sha256"/>
        <DigestValue>1JKMb8fNakVVkbMwqzlTgVHxbDEFtJP6KbXsHzAmqn4=</DigestValue>
      </Reference>
      <Reference URI="Basic/Gamma/Cherry.xml">
        <Transforms>
          <Transform Algorithm="http://www.w3.org/TR/2001/REC-xml-c14n-20010315"/>
        </Transforms>
        <DigestMethod Algorithm="http://www.w3.org/2001/04/xmlenc#sha256"/>
        <DigestValue>6am82vXA9DYKAeXtVouqJNyfx50kYothfebwi1iEazA=</DigestValue>
      </Reference>
      <Reference URI="Basic/Gamma/Damson.xml">
        <Transforms>
          <Transform Algorithm="http://www.w3.org/TR/2001/REC-xml-c14n-20010315"/>
        </Transforms>
        <DigestMethod Algorithm="http://www.w3.org/2001/04/xmlenc#sha256"/>
        <DigestValue>FZlIrbsEd3Eq7qrakgQUMNjczDq6uwvWzaEAwai7Sn4=</DigestValue>
      </Reference>
      <Reference URI="Basic/Gamma/Banana.xml">
        <Transforms>
          <Transform Algorithm="http://www.w3.org/TR/2001/REC-xml-c14n-20010315"/>
        </Transforms>
        <DigestMethod Algorithm="http://www.w3.org/2001/04/xmlenc#sha256"/>
        <DigestValue>ahWwvtYu1ZhrB4DYyBASfl1xLtzjGRcCUscBhhx/G7E=</DigestValue>
      </Reference>
      <Reference URI="Basic/Gamma/Apple.xml">
        <Transforms>
          <Transform Algorithm="http://www.w3.org/TR/2001/REC-xml-c14n-20010315"/>
        </Transforms>
        <DigestMethod Algorithm="http://www.w3.org/2001/04/xmlenc#sha256"/>
        <DigestValue>ZnDiekCCorPOEKKK3daupXiLiq+3bNHqm9dnBktXC/w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hIS11qVV1wNdzYZHG1wHq60b3c0FajfZwQ28djlxVDo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evMblvjMG/O0BDLI/2b2jOD7IwDFofvaJDlb7YwweEI=</DigestValue>
      </Reference>
      <Reference URI="#ID_00ae0093000000e100fb0006004a00710089007f0015009b00f900b900b8008e">
        <DigestMethod Algorithm="http://www.w3.org/2001/04/xmlenc#sha256"/>
        <DigestValue>Ski0jkb3+IwfgNQc5F0wSVgoZuqGV0N2DlCrKUorxWk=</DigestValue>
      </Reference>
      <Reference URI="#idSignedProperties_ID_0001008500f300f900260049004e00c1008e00280013002400c200b100d70007" Type="http://uri.etsi.org/01903#SignedProperties">
        <DigestMethod Algorithm="http://www.w3.org/2001/04/xmlenc#sha256"/>
        <DigestValue>ji5/NKvIN2cEcutNFm/XUq3n3225HpDF+pnUQwStXj4=</DigestValue>
      </Reference>
    </SignedInfo>
    <SignatureValue>Pv/3MTnyI351VMHtcVYIxPL4MF6m/OZJ4YJXenJ5XHxYzN0aowER2v1CBie40CQR
SkwkDY4nhxLuoVeFkwPmKVG0E+ZkMC0AR0X08fSVY/7dT7RlqP5FY6MPb28uh0pc
ei7HSPWnWUTVKOOSTwzqcj77skkVVo9XO73WkyEdkYMOTcle6xXJK8aRkgC4NsGr
UvH4jbGfi/ysiUr45IkFPvQZGMimrOjBx3732muZMMzPX9EpQ3l/inIdJeJ69i1Z
pnoawj0Aaq8EGXfpfn3Tf6VEZayEJT+dwpyw29PbnD9oglLIyDheJK21XN6KzDws
n8fi52N4nm3OKRbhFJGKIw==</SignatureValue>
    <KeyInfo>
      <X509Data>
        <X509IssuerSerial>
          <X509IssuerName>CN=Xmlsecurity Intermediate Root CA,O=Xmlsecurity RSA Test,ST=England,C=UK</X509IssuerName>
          <X509SerialNumber>4096</X509SerialNumber>
        </X509IssuerSerial>
        <X509Certificate>MIIFGDCCAwCgAwIBAgICEAAwDQYJKoZIhvcNAQELBQAwaTELMAkGA1UEBhMCVUsxEDAOBgNVBAgMB0VuZ2xhbmQxHTAbBgNVBAoMFFhtbHNlY3VyaXR5IFJTQSBUZXN0MSkwJwYDVQQDDCBYbWxzZWN1cml0eSBJbnRlcm1lZGlhdGUgUm9vdCBDQTAgFw0xODA2MDYxNTIwMDZaGA8yMTE4MDUxMzE1MjAwNlowazELMAkGA1UEBhMCVUsxEDAOBgNVBAgMB0VuZ2xhbmQxHTAbBgNVBAoMFFhtbHNlY3VyaXR5IFJTQSBUZXN0MSswKQYDVQQDDCJYbWxzZWN1cml0eSBSU0EgVGVzdCBleGFtcGxlIEFsaWNlMIIBIjANBgkqhkiG9w0BAQEFAAOCAQ8AMIIBCgKCAQEAv4zW2E77/3qQlVlw6XCSdr4nCgbeBpM5jl01QSkUSRNCqHRJXVnbAskjL09Wgn3GQH/Jfghgjcopu3+BZS9SCe4/jdEYbItdOZpBQGdRJFNpnx3cd4/XO/sm23NdtfXHzBAM4MI5xjRqqQ/WUXU1oIqXhQjsErdYXFlfm77j+Q5yiRULaBDm5F1BPxIW92vBX15x/trAUxJCpoy+SQYOOjUb9XAO4E024fSa2ABJhkZ7eH45FdzY3NqYcz68qDmGbnW/QlhOh1CMocOwSKHPzpbxcqaMpLs+HIk74lYe2wCkvzjLoG1/X8+AkZY4pQ8NyyCCjLRUeaIVkTwXK636OwIDAQABo4HFMIHCMAkGA1UdEwQCMAAwEQYJYIZIAYb4QgEBBAQDAgWgMDMGCWCGSAGG+EIBDQQmFiRPcGVuU1NMIEdlbmVyYXRlZCBDbGllbnQgQ2VydGlmaWNhdGUwHQYDVR0OBBYEFKDMlzSng3Xv+zA73vrEkdqynddEMB8GA1UdIwQYMBaAFDXB8g347TUPMvCNXTBSRQpVRvroMA4GA1UdDwEB/wQEAwIF4DAdBgNVHSUEFjAUBggrBgEFBQcDAgYIKwYBBQUHAwQwDQYJKoZIhvcNAQELBQADggIBACMU9XgPHgxuOJRlKTq6EQKhQM4a19dbOTpQCT3V7YxODq0kONdOXjW7AEbK4BLhHb00fihs7ETvdIh2Hdw11Fa9UK3A29JRMW0JOX1zKmincl7Wvg1DHWxJdRe4/JCsK+98u87Yc4ip2PBIXQzplFIxn+wG2MmSGos4KlgYxzDoA4Wqvbfr1teUiXzRfT+YfsTRWTtcapGnegE73b0OjYxyo6bOpFNPAFKUZNi/k8eLEbtN8wjBXYKjIY3bw0g4w5d/BQrzcAkwopNVOTYaiMI7FwYZpJvTWf+VA1wS504j4lghcxePm1s3moSzdZMta6IhV/QDsD9s9T8dhle1YQv/39pw7yjxzbMHBix6F7MoNIWCchgPh575doPErQ9y5Ng2c242wvfQQzzCi4NrOMOx6c+3y4ynvJOsOhq0jqMggwiuKAS92WNIP6zEfmcm4VtCtG6Pod8vbOtvdgbbJNuBGnIBjcfFz2XuQRJl9Z/KxCwqXGMS786OMjTCKbS/XZaHwvOwrJHo9igvQ502DP+2GwznZqgAIchxtWZxMzII36QPVpdnTujG/kCUwUqvutV3nuspcioWni9y+etTN367CNoqxE8FNB0mU4JecxhULP1UzDMBPucC8qKPiYCEKN/CfX6d4KZjZaqFbMNbDy7OAHl5uf9I4TFMd2TAnRPG</X509Certificate>
      </X509Data>
    </KeyInfo>
    <Object>
      <SignatureProperties>
        <SignatureProperty Id="ID_00ae0093000000e100fb0006004a00710089007f0015009b00f900b900b8008e" Target="#ID_0001008500f300f900260049004e00c1008e00280013002400c200b100d70007">
          <dc:date xmlns:dc="http://purl.org/dc/elements/1.1/">2026-06-22T20:04:32.102709406</dc:date>
        </SignatureProperty>
      </SignatureProperties>
    </Object>
    <Object xmlns:xd="http://uri.etsi.org/01903/v1.3.2#">
      <xd:QualifyingProperties Target="#ID_0001008500f300f900260049004e00c1008e00280013002400c200b100d70007">
        <xd:SignedProperties Id="idSignedProperties_ID_0001008500f300f900260049004e00c1008e00280013002400c200b100d70007">
          <xd:SignedSignatureProperties>
            <xd:SigningTime>2026-06-22T20:04:32.102709406</xd:SigningTime>
            <xd:SigningCertificate>
              <xd:Cert>
                <xd:CertDigest>
                  <DigestMethod Algorithm="http://www.w3.org/2001/04/xmlenc#sha256"/>
                  <DigestValue>9f6idfZUdT2NRpF9/BKy/HFdAOH9QuVjunxM9Zjt3Vo=</DigestValue>
                </xd:CertDigest>
                <xd:IssuerSerial>
                  <X509IssuerName>CN=Xmlsecurity Intermediate Root CA,O=Xmlsecurity RSA Test,ST=England,C=UK</X509IssuerName>
                  <X509SerialNumber>409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01008500f300f900260049004e00c1008e00280013002400c200b100d70007">
          <xd:UnsignedSignatureProperties>
            <xd:CertificateValues>
              <xd:EncapsulatedX509Certificate>MIIFGDCCAwCgAwIBAgICEAAwDQYJKoZIhvcNAQELBQAwaTELMAkGA1UEBhMCVUsxEDAOBgNVBAgMB0VuZ2xhbmQxHTAbBgNVBAoMFFhtbHNlY3VyaXR5IFJTQSBUZXN0MSkwJwYDVQQDDCBYbWxzZWN1cml0eSBJbnRlcm1lZGlhdGUgUm9vdCBDQTAgFw0xODA2MDYxNTIwMDZaGA8yMTE4MDUxMzE1MjAwNlowazELMAkGA1UEBhMCVUsxEDAOBgNVBAgMB0VuZ2xhbmQxHTAbBgNVBAoMFFhtbHNlY3VyaXR5IFJTQSBUZXN0MSswKQYDVQQDDCJYbWxzZWN1cml0eSBSU0EgVGVzdCBleGFtcGxlIEFsaWNlMIIBIjANBgkqhkiG9w0BAQEFAAOCAQ8AMIIBCgKCAQEAv4zW2E77/3qQlVlw6XCSdr4nCgbeBpM5jl01QSkUSRNCqHRJXVnbAskjL09Wgn3GQH/Jfghgjcopu3+BZS9SCe4/jdEYbItdOZpBQGdRJFNpnx3cd4/XO/sm23NdtfXHzBAM4MI5xjRqqQ/WUXU1oIqXhQjsErdYXFlfm77j+Q5yiRULaBDm5F1BPxIW92vBX15x/trAUxJCpoy+SQYOOjUb9XAO4E024fSa2ABJhkZ7eH45FdzY3NqYcz68qDmGbnW/QlhOh1CMocOwSKHPzpbxcqaMpLs+HIk74lYe2wCkvzjLoG1/X8+AkZY4pQ8NyyCCjLRUeaIVkTwXK636OwIDAQABo4HFMIHCMAkGA1UdEwQCMAAwEQYJYIZIAYb4QgEBBAQDAgWgMDMGCWCGSAGG+EIBDQQmFiRPcGVuU1NMIEdlbmVyYXRlZCBDbGllbnQgQ2VydGlmaWNhdGUwHQYDVR0OBBYEFKDMlzSng3Xv+zA73vrEkdqynddEMB8GA1UdIwQYMBaAFDXB8g347TUPMvCNXTBSRQpVRvroMA4GA1UdDwEB/wQEAwIF4DAdBgNVHSUEFjAUBggrBgEFBQcDAgYIKwYBBQUHAwQwDQYJKoZIhvcNAQELBQADggIBACMU9XgPHgxuOJRlKTq6EQKhQM4a19dbOTpQCT3V7YxODq0kONdOXjW7AEbK4BLhHb00fihs7ETvdIh2Hdw11Fa9UK3A29JRMW0JOX1zKmincl7Wvg1DHWxJdRe4/JCsK+98u87Yc4ip2PBIXQzplFIxn+wG2MmSGos4KlgYxzDoA4Wqvbfr1teUiXzRfT+YfsTRWTtcapGnegE73b0OjYxyo6bOpFNPAFKUZNi/k8eLEbtN8wjBXYKjIY3bw0g4w5d/BQrzcAkwopNVOTYaiMI7FwYZpJvTWf+VA1wS504j4lghcxePm1s3moSzdZMta6IhV/QDsD9s9T8dhle1YQv/39pw7yjxzbMHBix6F7MoNIWCchgPh575doPErQ9y5Ng2c242wvfQQzzCi4NrOMOx6c+3y4ynvJOsOhq0jqMggwiuKAS92WNIP6zEfmcm4VtCtG6Pod8vbOtvdgbbJNuBGnIBjcfFz2XuQRJl9Z/KxCwqXGMS786OMjTCKbS/XZaHwvOwrJHo9igvQ502DP+2GwznZqgAIchxtWZxMzII36QPVpdnTujG/kCUwUqvutV3nuspcioWni9y+etTN367CNoqxE8FNB0mU4JecxhULP1UzDMBPucC8qKPiYCEKN/CfX6d4KZjZaqFbMNbDy7OAHl5uf9I4TFMd2TAnRPG</xd:EncapsulatedX509Certificate>
              <xd:EncapsulatedX509Certificate>MIIFsjCCA5qgAwIBAgICEAAwDQYJKoZIhvcNAQELBQAwZTELMAkGA1UEBhMCVUsxEDAOBgNVBAgMB0VuZ2xhbmQxHTAbBgNVBAoMFFhtbHNlY3VyaXR5IFJTQSBUZXN0MSUwIwYDVQQDDBxYbWxzZWN1cml0eSBSU0EgVGVzdCBSb290IENBMCAXDTE4MDYwNjE1MjAwNloYDzIxMTgwNTEzMTUyMDA2WjBpMQswCQYDVQQGEwJVSzEQMA4GA1UECAwHRW5nbGFuZDEdMBsGA1UECgwUWG1sc2VjdXJpdHkgUlNBIFRlc3QxKTAnBgNVBAMMIFhtbHNlY3VyaXR5IEludGVybWVkaWF0ZSBSb290IENBMIICIjANBgkqhkiG9w0BAQEFAAOCAg8AMIICCgKCAgEA+uBkXt39Yc0aOe2UkBWlVIqQcvlSwLheXlcGeDDIPSwSRaDcuGdGQXs+WFM65xDak8eZJwyyQSWtoDRV0lXEP63OJk/ktWLjFywLP69gBr2E4vsjOdr9DR94AAQY2WTW2/UXxcI92nB+sq6ZhVF5I9rfzDHPGYEiWTQqtnTMJDGpO5eo9JBjQtaB/sHG7ZnxF1FOl6V85F/dfGG3MBGp9glg5qE6QDjA11DsTukiV5OeP8vZsmoYkyNmViA7L+xuOM6iVUGY+b4XDCeI1Kgr5ZhF9xL7ByVTxtZrdMXzcPu+Dgcr9VF7QqhAYg/W/0s4WzoyXV/f1fjC5+uKXWSuttrRHNt16DMOh5T1lS4qHLfMoDYZ+AK8L0JrjQMXCzCp4WTmqplBg6bYWFpHvyzp0uccYJdUXv5o6PFhpIV6VpdVtT6fVfh9V5C5jDKBv+n14rZ9hPYzvIxVAnF6SYtXRTbrSzSDi5QqCiWwU56uSAWyyrwdED1zETgTDmGOFv5j2tIEcAbQ6TT8n/Mit5NuL98M5XxPnKduCQ39ssKDwO146lAe5kREJRv4Va/o47tards6tdkaV5267rXZA7ndvnov0TmZFNwDMQz9tRZJov07V7kriLS47xD/eDH7IyEOWYsgoU3N1J1GZKCYSRxZ3Wh6AiZy211PYwuJpP3xugUCAwEAAaNmMGQwHQYDVR0OBBYEFDXB8g347TUPMvCNXTBSRQpVRvroMB8GA1UdIwQYMBaAFOOqggO/I6PkIyJZqJ16mbDbtiXxMBIGA1UdEwEB/wQIMAYBAf8CAQAwDgYDVR0PAQH/BAQDAgGGMA0GCSqGSIb3DQEBCwUAA4ICAQAiyaCtGnPZRsfGD69yjkPptc6cwa8icyF9iiJwdngjvdMTCOJHhUAtzGTOuUITJEh0OJYzabB+EUgHmZWe6hwrWCzhJQysDktdsARQOB91Vi19VyDrcHPxnn43zObnbkLpFvZXg3Q3/S+eiTn/UWMg7f2tQjaCdj6xx1DGTiJmZBRI/CG24EWzYy+H7/MBNFuW3+1CdoDuPR3lkbWmYFJbvkOaWR8+faL6o5u7IagKCSmMaNDjRQA8/LKwJ8waD61Hw4S4H465I16UVCT4d226anZIfz7N3/NbVw0B8emJP1ZtVty1vDPEx/6A7+sXfgAYgjfMeiHhGHs17i2d7EvdwxlyvKq/iQkLMzkyAkA5kpUbZ/kpOQh8sR9JHxv3QEz0clRvRIwlJU5W+Pa1e3dNYTDR9x0fBaLwPUIc5RnnSZ5Aws2qxnp7yYrQzxTtLd3IoDU4BuuyBE+/PaukbbfJUnr+e9Pwt+OXqrECnhxz+f0FDAMlX0CEe7Vlx8p37roBiT4sf3anXrNyrUZMQWQFLs9H3+yooEJJWTgs7QjFZ0l5LIQyTv1I4UmGBgEWlW8UNIJhvAeq1ykY+WZwAt9JDlNwiAbFbFoMqGkVZDko1foTE8KUJfgth63ZmdWw1yzX8H9+zDlhpHCehJsJ68Rk7INjBNZr6IxpVViGLsW1qQ==</xd:EncapsulatedX509Certificate>
              <xd:EncapsulatedX509Certificate>MIIFsjCCA5qgAwIBAgIJAJcWvaoTLkqaMA0GCSqGSIb3DQEBCwUAMGUxCzAJBgNVBAYTAlVLMRAwDgYDVQQIDAdFbmdsYW5kMR0wGwYDVQQKDBRYbWxzZWN1cml0eSBSU0EgVGVzdDElMCMGA1UEAwwcWG1sc2VjdXJpdHkgUlNBIFRlc3QgUm9vdCBDQTAgFw0xODA2MDYxNTIwMDRaGA8yMTE4MDUxMzE1MjAwNFowZTELMAkGA1UEBhMCVUsxEDAOBgNVBAgMB0VuZ2xhbmQxHTAbBgNVBAoMFFhtbHNlY3VyaXR5IFJTQSBUZXN0MSUwIwYDVQQDDBxYbWxzZWN1cml0eSBSU0EgVGVzdCBSb290IENBMIICIjANBgkqhkiG9w0BAQEFAAOCAg8AMIICCgKCAgEAvommgzYw9/W2M+75as1pV6UZ8Wr+hpici0TsoH/KHWYLWmS9i8IA1Yf6BY3ISAuKvDfqTWgyoDFeJyTVzNNUHlYf6YmrIYgG0Db2rnocihcMMFuVnXREwbQgigWY93iCNi2KpoGOWB63ZupyfMTeyj7FuvYt4AltJ7Q0o+RIRGx61aeP2goGix9o1jkjBN6Tn3wQ3eJgoa0CSPkfaeY+wVO+eUElYE35FwmPWR68AnF7hg/SS1RENSQ4ZqVA1GK2fKakX6e7zkqJCb6ZuQ2nX5GNJWFFSlBXJWrVqpBZveKLMfGQakZUswz3FRPXN0qUK40vKXblESuN35PHXqVfSAPEQ6iGKJU7VC3uTPdCyBztwJbIAs+Rq9dxb6yZv68XChGhee3VW0/ae/GprkHEnePBk8pbkSqS052Z9y36NnjRwZRVnRmQjw6XS1h2c6cdRsV9x2FwmllAQhz6V2rZu/OdS9iCG3CE45nDngYg4VnDw4p9jnCea6MYVPBtPU9f2NjnInIxUGRidX2N2q1y9UiPOU87mlolyQASV+StxwHkm7Ja6w+MRfwgU2/oOLlc3MpMy44rcsRAlhbJ4CWXRwEw+xJoHb3W0l+iy476MtfMaHwaRE/xsPm+MXgXMj+ebE59ceC6GJS6OA5n55KR65zpmQsM4n3yzJrU9hMxDKMCAwEAAaNjMGEwHQYDVR0OBBYEFOOqggO/I6PkIyJZqJ16mbDbtiXxMB8GA1UdIwQYMBaAFOOqggO/I6PkIyJZqJ16mbDbtiXxMA8GA1UdEwEB/wQFMAMBAf8wDgYDVR0PAQH/BAQDAgGGMA0GCSqGSIb3DQEBCwUAA4ICAQAkbgICYnJANqIGft/0chg1uSm6eZMrl0kfACZKFpL8KOhj7C66cIeskf7WcJbHQOW3CAg0OZpkS9nhvPxOysQblS+sQwo9dWiN7NATokTxySYGFdrENXSUdGI9MMFsizg8qN07EtbynqbdJwFNDaomJz0mUXYlxtCR4gTGorWmL8EzJIN98LXuMDm5gomd5RTCgqc1hBT+Dq0E3WapnUVlMFr1KS8ex/RKfVBQ5gJRJ10ZIasaVdpCl3gGFd8MAMyqqZXOyltO1RRTTXYzt50G1UmAEd2SDH6ADqj8T04I0UirpsQ7b4GasJomWQBuCv9jY65rAOfd7mWH4RDmVn2P4XCVZ6++oCmr2CMERfoRsVIt3xgx5OuuV4MdAcVBw6LMkQz6JRp92kEGPME9x1wnDRcnks58znCvosZREwLY/stWq2eLbOKZ5dCJqiC4xGca5l0wJETudU5WLdIgPDUFQ2tTXuuBctjdzh8+Fyc6N2qMp3+U2m2pEArId/6axaQhjGJEDJMV6J03WiZ8l/9GjIlX2HQGbqRvHAL7kUEkP4tZOUiwGGotakFvJJiVWDynVphL8gTamR1laTYht0mZGtZ5JTMcwpE37+2diMfAy/hqjOXDcyNAw3xtLDlX6i5XK2rpru8GaWPikRkgTfRBdWWfRjl+0sE5+e1N8mHdMQ==</xd:EncapsulatedX509Certificate>
            </xd:CertificateValues>
          </xd:UnsignedSignatureProperties>
        </xd:UnsignedProperties>
      </xd:QualifyingProperties>
    </Object>
  </Signature>
</document-signatures>
</file>