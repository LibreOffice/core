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auto-grow-height="false" draw:fit-to-size="true" style:shrink-to-fit="false" fo:min-height="5.2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3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font-independent-line-spacing="true"/>
      <style:text-properties style:font-name="Liberation Sans" fo:font-size="999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99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99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cm" svg:height="0.5cm" svg:x="0cm" svg:y="0cm">
          <draw:text-box>
            <text:p text:style-name="P1"><text:span text:style-name="T1">test test test test test test test test test </text:span><text:span text:style-name="T2">test test test te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1-02T21:40:53.900999761</meta:creation-date>
    <meta:editing-duration>PT7M39S</meta:editing-duration>
    <meta:editing-cycles>4</meta:editing-cycles>
    <meta:generator>Collabora_Office/26.04.0.1$Linux_X86_64 LibreOffice_project/15af671fe0c8dc8be810c1d21edb54f2043451d0</meta:generator>
    <dc:date>2022-11-02T22:20:58.446026320</dc:date>
    <meta:document-statistic meta:object-count="1"/>
  </office:meta>
</office:document-meta>
</file>