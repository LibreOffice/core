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7D552269.png" manifest:media-type="image/png"/>
  <manifest:file-entry manifest:full-path="Pictures/1000107200001F0200001F02891ED795.svg" manifest:media-type="image/svg+xml"/>
  <manifest:file-entry manifest:full-path="Pictures/10000000000004F800000354A576AE9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svg:stroke-opacity="100%" draw:opacity="100%" draw:opacity-name="Transparency_20_1" draw:textarea-horizontal-align="justify" draw:textarea-vertical-align="middle" draw:auto-grow-height="false" fo:min-height="1.691cm" fo:min-width="4.78cm" fo:padding-top="0.178cm" fo:padding-bottom="0.178cm" fo:padding-left="0.303cm" fo:padding-right="0.303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width="0.106cm" svg:stroke-color="#d6a085" draw:marker-start-width="0.359cm" draw:marker-end-width="0.359cm" svg:stroke-linecap="round" draw:fill="solid" draw:fill-color="#92d050" draw:textarea-horizontal-align="justify" draw:textarea-vertical-align="middle" draw:auto-grow-height="false" fo:min-height="1.233cm" fo:min-width="1.502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dash" draw:stroke-dash="Dot" svg:stroke-width="0.106cm" svg:stroke-color="#d6a085" draw:marker-start-width="0.359cm" draw:marker-end-width="0.359cm" svg:stroke-linecap="butt" draw:fill="solid" draw:fill-color="#92d050" draw:textarea-horizontal-align="justify" draw:textarea-vertical-align="middle" draw:auto-grow-height="false" fo:min-height="1.233cm" fo:min-width="1.502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solid" svg:stroke-width="0.106cm" svg:stroke-color="#000000" draw:marker-start-width="0.358cm" draw:marker-end-width="0.358cm" svg:stroke-linecap="round" draw:fill="none" draw:fill-color="#000000" loext:fill-use-slide-background="false" draw:textarea-vertical-align="middle" draw:auto-grow-height="false" fo:min-height="1.786cm" fo:min-width="1.816cm" fo:padding-top="0.16cm" fo:padding-bottom="0.16cm" fo:padding-left="0.285cm" fo:padding-right="0.285cm" fo:wrap-option="wrap" loext:glow-radius="0.176cm" loext:glow-color="#c0c0c0" loext:glow-transparency="25%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106cm" draw:marker-start-width="0.359cm" draw:marker-end-width="0.359cm" draw:opacity="100%" draw:textarea-horizontal-align="justify" draw:textarea-vertical-align="middle" draw:auto-grow-height="false" fo:min-height="1.691cm" fo:min-width="2.968cm" fo:padding-top="0.178cm" fo:padding-bottom="0.178cm" fo:padding-left="0.303cm" fo:padding-right="0.303cm" draw:shadow="visible" loext:shadow-blur="0.35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_20__28_Rounded_29_" svg:stroke-color="#3faf46" draw:marker-start="Arrowheads_20_1" draw:marker-end="Arrowheads_20_2" svg:stroke-linecap="round" draw:fill="none" draw:textarea-vertical-align="middle" draw:shadow="visible" draw:shadow-offset-x="0.1cm" draw:shadow-offset-y="0.1cm" loext:shadow-blur="0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 draw:opacity-name="Transparency_20_1"/>
      <style:paragraph-properties fo:text-align="center" style:writing-mode="lr-tb"/>
    </style:style>
    <style:style style:name="P3" style:family="paragraph">
      <loext:graphic-properties draw:fill="solid" draw:fill-color="#92d05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100%"/>
      <style:paragraph-properties fo:text-align="center" style:writing-mode="lr-tb"/>
    </style:style>
    <style:style style:name="P7" style:family="paragraph">
      <loext:graphic-properties draw:fill-color="#fffff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line-through-style="none" style:text-line-through-type="none" fo:font-style="italic" style:font-style-asian="italic" style:font-style-complex="italic"/>
    </style:style>
    <style:style style:name="T3" style:family="text">
      <style:text-properties style:text-line-through-style="none" style:text-line-through-type="none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5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style:text-position="0% 100%" fo:text-shadow="1pt 1pt"/>
    </style:style>
    <style:style style:name="T9" style:family="text">
      <style:text-properties style:text-outline="true" style:text-position="0% 100%" fo:text-shadow="none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42pt" fo:font-style="normal" fo:font-weight="normal" style:font-size-asian="42pt" style:font-style-asian="normal" style:font-weight-asian="normal" style:font-size-complex="42pt" style:font-style-complex="normal" style:font-weight-complex="normal"/>
    </style:style>
    <style:style style:name="T12" style:family="text">
      <style:text-properties fo:color="#ff0000" loext:opacity="100%"/>
    </style:style>
    <style:style style:name="T13" style:family="text">
      <style:text-properties fo:color="#00a933" loext:opacity="100%"/>
    </style:style>
    <style:style style:name="T14" style:family="text">
      <style:text-properties fo:color="#2a6099" loext:opacity="100%"/>
    </style:style>
    <style:style style:name="T15" style:family="text">
      <style:text-properties fo:background-color="#ffffd7"/>
    </style:style>
    <style:style style:name="T16" style:family="text">
      <style:text-properties fo:color="#55308d" loext:opacity="100%" style:font-name="Liberation Serif" fo:font-size="20pt" style:font-size-asian="20pt" style:font-size-complex="20pt"/>
    </style:style>
    <style:style style:name="T17" style:family="text">
      <style:text-properties fo:color="#2a6099" loext:opacity="100%" style:font-name="Liberation Serif" fo:font-size="20pt" style:font-size-asian="20pt" style:font-size-complex="20pt"/>
    </style:style>
    <style:style style:name="T18" style:family="text">
      <style:text-properties fo:color="#bf0041" loext:opacity="100%" style:font-name="Liberation Mono" fo:font-size="16pt" style:font-size-asian="16pt" style:font-size-complex="16pt"/>
    </style:style>
    <style:style style:name="T19" style:family="text">
      <style:text-properties fo:color="#2a6099" loext:opacity="100%" style:font-name="Liberatio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18.962cm" svg:height="2.629cm" svg:x="0.457cm" svg:y="0.628cm" presentation:class="title" presentation:user-transformed="true">
          <draw:text-box>
            <text:p>Title Of The Slide!</text:p>
          </draw:text-box>
        </draw:frame>
        <draw:frame presentation:style-name="pr2" draw:layer="layout" svg:width="21.168cm" svg:height="8.898cm" svg:x="0.361cm" svg:y="3.982cm" presentation:class="outline" presentation:user-transformed="true">
          <draw:text-box>
            <text:list text:style-name="L2">
              <text:list-item>
                <text:p><text:span text:style-name="T1">Bold</text:span> <text:span text:style-name="T2">Italic </text:span><text:span text:style-name="T3">Underline</text:span><text:span text:style-name="T4"> </text:span><text:span text:style-name="T5">Strike-through</text:span></text:p>
              </text:list-item>
              <text:list-item>
                <text:p><text:span text:style-name="T6">Super</text:span> Normal <text:span text:style-name="T7">Subscript</text:span> <text:span text:style-name="T8">Shadow</text:span> <text:span text:style-name="T9">Outline</text:span></text:p>
              </text:list-item>
              <text:list-item>
                <text:p><text:span text:style-name="T10">Smaller </text:span><text:span text:style-name="T11">Larger</text:span></text:p>
              </text:list-item>
              <text:list-item>
                <text:p>Colors… <text:span text:style-name="T12">Red </text:span><text:span text:style-name="T13">Green </text:span><text:span text:style-name="T14">Blue </text:span><text:span text:style-name="T15">Highlight</text:span></text:p>
              </text:list-item>
              <text:list-item>
                <text:p><text:span text:style-name="T16">Liberation Serif 20pt</text:span><text:span text:style-name="T17"> </text:span>and<text:span text:style-name="T17"> </text:span><text:span text:style-name="T18">Liberation Mono 16pt</text:span></text:p>
              </text:list-item>
              <text:list-item>
                <text:p><text:span text:style-name="T19">Liberation Sans 10pt</text:span></text:p>
              </text:list-item>
            </text:list>
          </draw:text-box>
        </draw:frame>
        <draw:custom-shape draw:style-name="gr1" draw:text-style-name="P2" draw:layer="layout" svg:width="5.386cm" svg:height="2.047cm" svg:x="22.348cm" svg:y="2.661cm">
          <text:p text:style-name="P1">Transpar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08cm" svg:height="1.589cm" svg:x="22.663cm" svg:y="0.5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08cm" svg:height="1.589cm" svg:x="25.341cm" svg:y="0.5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3cm" svg:height="3.386cm" svg:x="22.537cm" svg:y="6.079cm">
          <text:p/>
          <draw:enhanced-geometry svg:viewBox="0 0 21600 21600" draw:mirror-horizontal="true" draw:glue-points="21600 0 0 10800 21600 21600 ?f0 10800" draw:text-areas="?f1 ?f10 21600 ?f11" draw:type="moon" draw:modifiers="3894.6231915353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range-x-minimum="0" draw:handle-range-x-maximum="18900" draw:handle-position="$0 10800" draw:handle-position-x="$0" draw:handle-position-y="10800"/>
          </draw:enhanced-geometry>
        </draw:custom-shape>
        <draw:frame draw:style-name="gr5" draw:text-style-name="P5" draw:layer="layout" svg:width="5.409cm" svg:height="3.606cm" svg:x="21.853cm" svg:y="11.197cm">
          <draw:image xlink:href="Pictures/10000000000004F800000354A576AE94.jpg" xlink:type="simple" xlink:show="embed" xlink:actuate="onLoad" draw:mime-type="image/jpeg">
            <text:p/>
          </draw:image>
        </draw:frame>
        <draw:frame draw:style-name="gr5" draw:text-style-name="P5" draw:layer="layout" svg:width="2.343cm" svg:height="2.343cm" svg:x="17.62cm" svg:y="12.653cm">
          <draw:image xlink:href="Pictures/1000107200001F0200001F02891ED795.svg" xlink:type="simple" xlink:show="embed" xlink:actuate="onLoad" draw:mime-type="image/svg+xml">
            <text:p/>
          </draw:image>
          <draw:image xlink:href="Pictures/100000010000012C0000012C7D552269.png" xlink:type="simple" xlink:show="embed" xlink:actuate="onLoad" draw:mime-type="image/png"/>
        </draw:frame>
        <draw:custom-shape draw:style-name="gr6" draw:text-style-name="P6" draw:layer="layout" svg:width="3.574cm" svg:height="2.047cm" svg:x="18.333cm" svg:y="0.205cm">
          <text:p text:style-name="P1">With shadow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711cm" svg:y1="14.997cm" svg:x2="12.027cm" svg:y2="13.349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941cm" fo:min-width="0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302cm" svg:height="2.191cm" svg:x="0.846cm" svg:y="13.26cm">
        <draw:text-box>
          <text:p><text:span text:style-name="MT2">Text On The Master Slide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0:27:40.194290253</meta:creation-date>
    <dc:date>2026-03-04T19:00:50.467050600</dc:date>
    <meta:editing-duration>PT11M20S</meta:editing-duration>
    <meta:editing-cycles>4</meta:editing-cycles>
    <meta:generator>Collabora_Office/26.04.0.1$Linux_X86_64 LibreOffice_project/bd3704683882a595920547db0496cd44e0181ea7</meta:generator>
    <meta:document-statistic meta:object-count="33"/>
  </office:meta>
</office:document-meta>
</file>